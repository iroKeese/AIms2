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03000000296711C218.png" manifest:media-type="image/png"/>
  <manifest:file-entry manifest:full-path="Pictures/1000A7E40000004D00000445654F687A.emf" manifest:media-type="image/x-emf"/>
  <manifest:file-entry manifest:full-path="Pictures/10000001000000E100000048E26251BC.png" manifest:media-type="image/png"/>
  <manifest:file-entry manifest:full-path="Pictures/1022483C0000173700000771ED20D508.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nux Libertine Display O" svg:font-family="'Linux Libertine Display O'" style:font-pitch="variable"/>
    <style:font-face style:name="MinionPro-Regular" svg:font-family="MinionPro-Regular" style:font-family-generic="roman" style:font-pitch="variable"/>
    <style:font-face style:name="MinionPro-Regular1" svg:font-family="MinionPro-Regular"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Textkörper CS)" svg:font-family="'Times New Roman (Textkörper CS)'" style:font-family-generic="system" style:font-pitch="variable"/>
  </office:font-face-decls>
  <office:automatic-styles>
    <style:style style:name="P1" style:family="paragraph" style:parent-style-name="Betreffzeile">
      <style:text-properties style:font-name="Linux Libertine Display O" fo:font-size="12pt" fo:language="de" fo:country="CH" fo:font-weight="normal" officeooo:paragraph-rsid="0006f80f" style:font-size-asian="12pt" style:font-weight-asian="normal" style:font-size-complex="12pt" style:font-weight-complex="normal"/>
    </style:style>
    <style:style style:name="P2" style:family="paragraph" style:parent-style-name="Standard">
      <style:text-properties fo:language="de" fo:country="CH"/>
    </style:style>
    <style:style style:name="P3" style:family="paragraph" style:parent-style-name="Standard">
      <style:text-properties style:font-name="Linux Libertine Display O" fo:font-size="12pt" fo:language="de" fo:country="CH" fo:font-weight="normal" style:font-size-asian="12pt" style:font-weight-asian="normal" style:font-size-complex="12pt" style:font-weight-complex="normal"/>
    </style:style>
    <style:style style:name="P4" style:family="paragraph" style:parent-style-name="Betreffzeile">
      <style:text-properties style:font-name="Linux Libertine Display O" fo:font-size="12pt" fo:language="de" fo:country="CH" fo:font-weight="normal" style:font-size-asian="12pt" style:font-weight-asian="normal" style:font-size-complex="12pt" style:font-weight-complex="normal"/>
    </style:style>
    <style:style style:name="P5" style:family="paragraph" style:parent-style-name="Frame_20_contents">
      <style:paragraph-properties fo:text-align="end" style:justify-single-word="false"/>
    </style:style>
    <style:style style:name="P6" style:family="paragraph">
      <loext:graphic-properties draw:fill="none"/>
      <style:paragraph-properties fo:text-align="start"/>
      <style:text-properties fo:font-size="18pt"/>
    </style:style>
    <style:style style:name="P7" style:family="paragraph" style:parent-style-name="Absender_20_fett">
      <style:text-properties officeooo:rsid="0006f80f" officeooo:paragraph-rsid="0006f80f" style:text-scale="100%"/>
    </style:style>
    <style:style style:name="P8" style:family="paragraph" style:parent-style-name="Absender_20_fett">
      <style:text-properties officeooo:paragraph-rsid="0006f80f" style:text-scale="100%"/>
    </style:style>
    <style:style style:name="P9" style:family="paragraph" style:parent-style-name="Absender_20_fett">
      <style:text-properties style:text-scale="100%"/>
    </style:style>
    <style:style style:name="P10" style:family="paragraph" style:parent-style-name="Sender">
      <style:text-properties style:text-scale="100%"/>
    </style:style>
    <style:style style:name="P11" style:family="paragraph" style:parent-style-name="Sender">
      <style:text-properties officeooo:rsid="0006f80f" officeooo:paragraph-rsid="0006f80f" style:text-scale="100%"/>
    </style:style>
    <style:style style:name="T1" style:family="text">
      <style:text-properties fo:language="de" fo:country="CH"/>
    </style:style>
    <style:style style:name="T2" style:family="text">
      <style:text-properties fo:color="#000000" loext:opacity="100%" fo:font-size="7pt" style:font-size-asian="7pt" style:font-name-complex="Arial1" style:font-size-complex="7pt">
        <loext:char-complex-color loext:theme-type="dark1" loext:color-type="theme"/>
      </style:text-properties>
    </style:style>
    <style:style style:name="T3" style:family="text">
      <style:text-properties fo:color="#000000" loext:opacity="100%" fo:font-size="7pt" fo:font-weight="bold" style:font-size-asian="7pt" style:font-weight-asian="bold" style:font-name-complex="Arial1" style:font-size-complex="7pt">
        <loext:char-complex-color loext:theme-type="dark1" loext:color-type="theme"/>
      </style:text-properties>
    </style:style>
    <style:style style:name="T4" style:family="text">
      <style:text-properties fo:color="#000000" loext:opacity="100%" fo:font-size="5pt" fo:font-weight="bold" style:font-size-asian="5pt" style:font-weight-asian="bold" style:font-name-complex="Arial1" style:font-size-complex="5pt" style:font-weight-complex="bold">
        <loext:char-complex-color loext:theme-type="dark1" loext:color-type="theme"/>
      </style:text-properties>
    </style:style>
    <style:style style:name="T5" style:family="text">
      <style:text-properties fo:font-weight="bold" style:font-weight-asian="bold"/>
    </style:style>
    <style:style style:name="T6" style:family="text">
      <style:text-properties style:text-scale="100%"/>
    </style:style>
    <style:style style:name="T7" style:family="text">
      <style:text-properties fo:language="de" fo:country="CH" fo:font-weight="bold" style:font-weight-asian="bold"/>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parent-style-name="Frame">
      <style:graphic-properties draw:stroke="none" svg:stroke-width="0.018cm" draw:fill="none" loext:fill-use-slide-background="false" draw:textarea-vertical-align="top" draw:auto-grow-height="false" fo:min-height="0.536cm" fo:min-width="1.182cm" fo:padding-top="0cm" fo:padding-bottom="0cm" fo:padding-left="0cm" fo:padding-right="0cm" fo:wrap-option="wrap" loext:decorative="false" fo:margin-left="0cm" fo:margin-right="0.0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18cm" draw:fill="none" loext:fill-use-slide-background="false" draw:textarea-vertical-align="top" draw:auto-grow-height="false" fo:min-height="1.485cm" fo:min-width="5.198cm" fo:padding-top="0cm" fo:padding-bottom="0cm" fo:padding-left="0cm" fo:padding-right="0cm" fo:wrap-option="wrap" loext:decorative="false" fo:margin-left="0cm" fo:margin-right="0.025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18cm" draw:fill="none" loext:fill-use-slide-background="false" draw:textarea-vertical-align="top" draw:auto-grow-height="false" fo:min-height="0.485cm" fo:min-width="6.634cm" fo:padding-top="0cm" fo:padding-bottom="0cm" fo:padding-left="0cm" fo:padding-right="0cm" fo:wrap-option="wrap" loext:decorative="false" fo:margin-left="0cm" fo:margin-right="0cm" fo:margin-top="0cm" fo:margin-bottom="0.01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018cm" draw:fill="none" loext:fill-use-slide-background="false" draw:textarea-vertical-align="top" draw:auto-grow-height="false" fo:min-height="4.524cm" fo:min-width="4.466cm" fo:padding-top="0cm" fo:padding-bottom="0cm" fo:padding-left="0cm" fo:padding-right="0cm" fo:wrap-option="wrap" loext:decorative="false" fo:margin-left="0cm" fo:margin-right="0.016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018cm" draw:fill="none" loext:fill-use-slide-background="false" draw:textarea-vertical-align="top" draw:auto-grow-height="false" fo:min-height="1.485cm" fo:min-width="8.486cm" fo:padding-top="0cm" fo:padding-bottom="0cm" fo:padding-left="0cm" fo:padding-right="0cm" fo:wrap-option="wrap" loext:decorative="false" fo:margin-left="0cm" fo:margin-right="0.0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the Editors</text:p>
      <text:p text:style-name="P1">Computers in Human Behavior</text:p>
      <text:p text:style-name="P1"><text:span text:style-name="T1"/></text:p>
      <text:p text:style-name="P2" loext:marker-style-name="T1"/>
      <text:p text:style-name="P2" loext:marker-style-name="T1"/>
      <text:p text:style-name="P3" loext:marker-style-name="T1"/>
      <text:p text:style-name="P3" loext:marker-style-name="T1">29 June 2026</text:p>
      <text:p text:style-name="P4"/>
      <text:p text:style-name="P4"/>
      <text:p text:style-name="P4">Dear Editors,</text:p>
      <text:p text:style-name="P4"/>
      <text:p text:style-name="P4">We are pleased to submit our manuscript, "When personalization deters delegation to algorithms: Evidence from a preregistered experiment," for consideration for publication in Computers in Human Behavior.</text:p>
      <text:p text:style-name="P4"/>
      <text:p text:style-name="P4">Algorithmic decision aids increasingly act on users' behalf, and in many everyday and high-stakes settings users can either retain control or delegate a decision to an algorithm. A widely held assumption among designers is that personalizing a system to a user's own preferences should increase its acceptance. Our paper provides a direct behavioral test of that assumption and finds that, contrary to the conventional view, preference-based personalization can deter delegation rather than encourage it.</text:p>
      <text:p text:style-name="P4"/>
      <text:p text:style-name="P4">In a preregistered between-subjects experiment (N = 233), participants repeatedly chose whether to decide themselves or delegate to an assigned algorithm. In one condition the algorithm followed an objective expected-value-maximizing rule; in the other it was personalized, selecting according to participants' previously elicited preferences. We find that at first contact participants were significantly less willing to delegate to the personalized algorithm than to the objective one, and that categorical non-delegation (never delegating) was substantially more prevalent under personalization (15.7% vs. 3.4%). Importantly, this resistance did not stem from doubts about the personalized algorithm's accuracy: participants expected it to match their preferences better than the objective rule, yet were no more willing to delegate to it. Our evidence instead points to a desire to retain choice authority as the relevant barrier.</text:p>
      <text:p text:style-name="P4"/>
      <text:p text:style-name="P4">We believe this work fits the scope and readership of Computers in Human Behavior for several reasons. First, it speaks directly to the human side of human-algorithm interaction, isolating how the perceived nature of an algorithm's decision rule, rather than its objective performance, shapes adoption behavior. Second, to our knowledge it is the first study to experimentally isolate the effect of the decision rule itself (preference-based versus objective) on actual delegation behavior, rather than varying interface, control, or communication format. Third, the findings have concrete design implications for robo-advisors, healthcare decision aids, and other recommender systems that routinely choose between objective optimization and preference-based personalization.</text:p>
      <text:p text:style-name="P4"/>
      <text:p text:style-name="P4">We confirm that this manuscript is original, has not been published previously, and is not under consideration for publication elsewhere. The study was preregistered (https://aspredicted.org/7un5qf.pdf) and received ethics approval from the Institutional Review Board of the Gesellschaft fuer experimentelle Wirtschaftsforschung e.V. (certificate no. 19HBJNwQ). All participants provided informed consent. The authors declare no conflicts of interest. Both authors have read and approved the manuscript and agree to its submission. Upon</text:p>
      <text:p text:style-name="P4"><text:soft-page-break/>acceptance, the data, analysis code, and study materials will be deposited in a public repository. Our use of generative AI tools in preparing the manuscript is disclosed in the manuscript itself.</text:p>
      <text:p text:style-name="P4"/>
      <text:p text:style-name="P4">We would be grateful for the opportunity to have our work considered, and we thank you for your time and consideration.</text:p>
      <text:p text:style-name="P4"/>
      <text:p text:style-name="P4">Sincerely,</text:p>
      <text:p text:style-name="P4"/>
      <text:p text:style-name="P4">Irenaeus Wolff (corresponding author), Thurgau Institute of Economics (TWI) /</text:p>
      <text:p text:style-name="P4">University of Konstanz</text:p>
      <text:p text:style-name="P4">Lara Suraci, DG Cit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nux Libertine Display O" svg:font-family="'Linux Libertine Display O'" style:font-pitch="variable"/>
    <style:font-face style:name="MinionPro-Regular" svg:font-family="MinionPro-Regular" style:font-family-generic="roman" style:font-pitch="variable"/>
    <style:font-face style:name="MinionPro-Regular1" svg:font-family="MinionPro-Regular"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Textkörper CS)" svg:font-family="'Times New Roman (Textkörper C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de" fo:country="DE" style:letter-kerning="false" style:font-name-asian="Calibri1" style:font-size-asian="12pt" style:language-asian="en" style:country-asian="US" style:font-family-complex="'Noto Sans'" style:font-family-generic-complex="system" style:font-pitch-complex="variable"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Calibri" fo:font-size="12pt" fo:language="de" fo:country="DE" style:letter-kerning="false" style:font-name-asian="Calibri1" style:font-size-asian="12pt" style:language-asian="en" style:country-asian="US" style:font-name-complex="Noto Sans Arabic UI"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0.423cm" fo:text-align="start" style:justify-single-word="false" fo:orphans="2" fo:widows="2" style:writing-mode="lr-tb"/>
      <style:text-properties style:font-name="Arial" fo:font-family="Arial" style:font-family-generic="roman" style:font-pitch="variable" fo:font-size="9.5pt" style:font-size-asian="9.5pt" style:font-name-complex="Times New Roman (Textkörper CS)" style:font-family-complex="'Times New Roman (Textkörper CS)'" style:font-family-generic-complex="system" style:font-pitch-complex="variable" style:text-scale="102%"/>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chapter">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Überschrift_20_2_20_Zchn" style:default-outline-level="2" style:list-style-name=""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loext:char-complex-color loext:theme-type="accent1" loext:color-type="theme">
          <loext:transformation loext:type="shade" loext:value="2509"/>
        </loext:char-complex-color>
      </style:text-properties>
    </style:style>
    <style:style style:name="Marinalie_20_TEST" style:display-name="Marinalie TEST" style:family="paragraph" style:parent-style-name="Standard">
      <style:text-properties fo:language="de" fo:country="CH"/>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Fußzeile_20_Zchn" style:class="extra">
      <style:paragraph-properties>
        <style:tab-stops>
          <style:tab-stop style:position="8.001cm" style:type="center"/>
          <style:tab-stop style:position="16.002cm" style:type="right"/>
        </style:tab-stops>
      </style:paragraph-properties>
    </style:style>
    <style:style style:name="_5b_Einf._20_Abs._5d_" style:display-name="[Einf. Abs.]" style:family="paragraph" style:parent-style-name="Standard">
      <style:paragraph-properties fo:line-height="120%" style:vertical-align="middle"/>
      <style:text-properties fo:color="#000000" loext:opacity="100%" style:font-name="MinionPro-Regular" fo:font-family="MinionPro-Regular" style:font-family-generic="roman" style:font-pitch="variable" fo:font-size="12pt" style:font-size-asian="12pt" style:font-name-complex="MinionPro-Regular1" style:font-family-complex="MinionPro-Regular" style:font-family-generic-complex="system" style:font-pitch-complex="variable"/>
    </style:style>
    <style:style style:name="Sender" style:family="paragraph" style:parent-style-name="Standard" style:class="extra">
      <style:paragraph-properties fo:line-height="0.318cm"/>
      <style:text-properties fo:font-size="7pt" style:font-size-asian="7pt" style:font-name-complex="Arial1" style:font-family-complex="Arial" style:font-family-generic-complex="system" style:font-pitch-complex="variable" style:font-size-complex="7pt" style:font-weight-complex="bold"/>
    </style:style>
    <style:style style:name="Absender_20_fett" style:display-name="Absender fett" style:family="paragraph" style:parent-style-name="Standard">
      <style:paragraph-properties fo:line-height="0.318cm"/>
      <style:text-properties fo:font-size="7pt" fo:font-weight="bold" style:font-size-asian="7pt" style:font-weight-asian="bold" style:font-name-complex="Arial1" style:font-family-complex="Arial" style:font-family-generic-complex="system" style:font-pitch-complex="variable" style:font-size-complex="7pt" style:font-weight-complex="bold"/>
    </style:style>
    <style:style style:name="Absenderline" style:family="paragraph" style:parent-style-name="Standard">
      <style:paragraph-properties fo:line-height="0.318cm"/>
      <style:text-properties fo:color="#000000" loext:opacity="100%" fo:font-size="6pt" fo:language="de" fo:country="CH" style:text-underline-style="solid" style:text-underline-width="auto" style:text-underline-color="font-color"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Betreffzeile" style:family="paragraph" style:parent-style-name="Standard">
      <style:text-properties fo:font-size="10.5pt" fo:language="de" fo:country="CH" fo:font-weight="bold" style:font-size-asian="10.5pt" style:font-weight-asian="bold" style:font-size-complex="10.5pt"/>
    </style:style>
    <style:style style:name="List_20_Paragraph" style:display-name="List Paragraph" style:family="paragraph" style:parent-style-name="Standard">
      <style:paragraph-properties fo:margin-left="1.27cm" fo:margin-top="0cm" fo:margin-bottom="0cm" style:contextual-spacing="true"/>
    </style:style>
    <style:style style:name="Standard_20_fett" style:display-name="Standard fett" style:family="paragraph" style:parent-style-name="Standard">
      <style:text-properties fo:language="de" fo:country="CH" fo:font-weight="bold" style:font-weight-asian="bold"/>
    </style:style>
    <style:style style:name="Absender_20_Person" style:display-name="Absender Person" style:family="paragraph" style:parent-style-name="Standard">
      <style:paragraph-properties fo:line-height="120%"/>
      <style:text-properties fo:font-size="8pt" style:font-size-asian="8pt" style:font-name-complex="Arial1" style:font-family-complex="Arial" style:font-family-generic-complex="system" style:font-pitch-complex="variable" style:font-size-complex="8pt"/>
    </style:style>
    <style:style style:name="Fusszeile" style:family="paragraph" style:parent-style-name="Standard">
      <style:paragraph-properties fo:line-height="0.318cm"/>
      <style:text-properties fo:font-size="7pt" style:font-size-asian="7pt"/>
    </style:style>
    <style:style style:name="toa_20_heading" style:display-name="toa heading" style:family="paragraph" style:parent-style-name="Standard" style:next-style-name="Standard">
      <style:paragraph-properties fo:margin-top="0.212cm" fo:margin-bottom="0cm" style:contextual-spacing="false"/>
      <style:text-properties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Noto Sans Arabic UI" style:font-family-complex="'Noto Sans Arabic UI'" style:font-family-generic-complex="system" style:font-pitch-complex="variable" style:font-weight-complex="bold"/>
    </style:style>
    <style:style style:name="Balloon_20_Text" style:display-name="Balloon Text" style:family="paragraph" style:parent-style-name="Standard" loext:linked-style-name="Sprechblasentext_20_Zchn">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Überschrift_20_1_20_Zchn" style:display-name="Überschrift 1 Zchn"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Überschrift_20_2_20_Zchn" style:display-name="Überschrift 2 Zchn"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text-scale="102%">
        <loext:char-complex-color loext:theme-type="accent1" loext:color-type="theme">
          <loext:transformation loext:type="shade" loext:value="2509"/>
        </loext:char-complex-color>
      </style:text-properties>
    </style:style>
    <style:style style:name="Sprechblasentext_20_Zchn" style:display-name="Sprechblasentext Zchn"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text-scale="102%"/>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4"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9"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Design">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Absender_20_fett">
      <style:text-properties officeooo:rsid="0006f80f" officeooo:paragraph-rsid="0006f80f" style:text-scale="100%"/>
    </style:style>
    <style:style style:name="MP2" style:family="paragraph" style:parent-style-name="Absender_20_fett">
      <style:text-properties officeooo:paragraph-rsid="0006f80f" style:text-scale="100%"/>
    </style:style>
    <style:style style:name="MP3" style:family="paragraph" style:parent-style-name="Absender_20_fett">
      <style:text-properties style:text-scale="100%"/>
    </style:style>
    <style:style style:name="MP4" style:family="paragraph" style:parent-style-name="Sender">
      <style:text-properties style:text-scale="100%"/>
    </style:style>
    <style:style style:name="MP5" style:family="paragraph" style:parent-style-name="Sender">
      <style:text-properties officeooo:rsid="0006f80f" officeooo:paragraph-rsid="0006f80f" style:text-scale="100%"/>
    </style:style>
    <style:style style:name="MP6" style:family="paragraph">
      <loext:graphic-properties draw:fill="none"/>
      <style:paragraph-properties fo:text-align="start"/>
      <style:text-properties fo:font-size="18pt"/>
    </style:style>
    <style:style style:name="MP7" style:family="paragraph" style:parent-style-name="Frame_20_contents">
      <style:paragraph-properties fo:text-align="end" style:justify-single-word="false"/>
    </style:style>
    <style:style style:name="MT1" style:family="text">
      <style:text-properties style:text-scale="100%"/>
    </style:style>
    <style:style style:name="MT2" style:family="text">
      <style:text-properties fo:color="#000000" loext:opacity="100%" fo:font-size="7pt" style:font-size-asian="7pt" style:font-name-complex="Arial1" style:font-size-complex="7pt">
        <loext:char-complex-color loext:theme-type="dark1" loext:color-type="theme"/>
      </style:text-properties>
    </style:style>
    <style:style style:name="MT3" style:family="text">
      <style:text-properties fo:color="#000000" loext:opacity="100%" fo:font-size="7pt" fo:font-weight="bold" style:font-size-asian="7pt" style:font-weight-asian="bold" style:font-name-complex="Arial1" style:font-size-complex="7pt">
        <loext:char-complex-color loext:theme-type="dark1" loext:color-type="theme"/>
      </style:text-properties>
    </style:style>
    <style:style style:name="MT4" style:family="text">
      <style:text-properties fo:color="#000000" loext:opacity="100%" fo:font-size="5pt" fo:font-weight="bold" style:font-size-asian="5pt" style:font-weight-asian="bold" style:font-name-complex="Arial1" style:font-size-complex="5pt" style:font-weight-complex="bold">
        <loext:char-complex-color loext:theme-type="dark1" loext:color-type="theme"/>
      </style:text-properties>
    </style:style>
    <style:style style:name="MT5" style:family="text">
      <style:text-properties fo:language="de" fo:country="CH"/>
    </style:style>
    <style:style style:name="MT6" style:family="text">
      <style:text-properties fo:language="de" fo:country="CH" fo:font-weight="bold" style:font-weight-asian="bold"/>
    </style:style>
    <style:style style:name="MT7" style:family="text">
      <style:text-properties fo:font-weight="bold"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parent-style-name="Frame">
      <style:graphic-properties draw:stroke="none" svg:stroke-width="0.018cm" draw:fill="none" loext:fill-use-slide-background="false" draw:textarea-vertical-align="top" draw:auto-grow-height="false" fo:min-height="4.524cm" fo:min-width="4.466cm" fo:padding-top="0cm" fo:padding-bottom="0cm" fo:padding-left="0cm" fo:padding-right="0cm" fo:wrap-option="wrap" loext:decorative="false" fo:margin-left="0cm" fo:margin-right="0.016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018cm" draw:fill="none" loext:fill-use-slide-background="false" draw:textarea-vertical-align="top" draw:auto-grow-height="false" fo:min-height="0.485cm" fo:min-width="6.634cm" fo:padding-top="0cm" fo:padding-bottom="0cm" fo:padding-left="0cm" fo:padding-right="0cm" fo:wrap-option="wrap" loext:decorative="false" fo:margin-left="0cm" fo:margin-right="0cm" fo:margin-top="0cm" fo:margin-bottom="0.01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parent-style-name="Frame">
      <style:graphic-properties draw:stroke="none" svg:stroke-width="0.018cm" draw:fill="none" loext:fill-use-slide-background="false" draw:textarea-vertical-align="top" draw:auto-grow-height="false" fo:min-height="0.536cm" fo:min-width="1.182cm" fo:padding-top="0cm" fo:padding-bottom="0cm" fo:padding-left="0cm" fo:padding-right="0cm" fo:wrap-option="wrap" loext:decorative="false" fo:margin-left="0cm" fo:margin-right="0.0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parent-style-name="Frame">
      <style:graphic-properties draw:stroke="none" svg:stroke-width="0.018cm" draw:fill="none" loext:fill-use-slide-background="false" draw:textarea-vertical-align="top" draw:auto-grow-height="false" fo:min-height="1.485cm" fo:min-width="8.486cm" fo:padding-top="0cm" fo:padding-bottom="0cm" fo:padding-left="0cm" fo:padding-right="0cm" fo:wrap-option="wrap" loext:decorative="false" fo:margin-left="0cm" fo:margin-right="0.0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parent-style-name="Frame">
      <style:graphic-properties draw:stroke="none" svg:stroke-width="0.018cm" draw:fill="none" loext:fill-use-slide-background="false" draw:textarea-vertical-align="top" draw:auto-grow-height="false" fo:min-height="1.485cm" fo:min-width="5.198cm" fo:padding-top="0cm" fo:padding-bottom="0cm" fo:padding-left="0cm" fo:padding-right="0cm" fo:wrap-option="wrap" loext:decorative="false" fo:margin-left="0cm" fo:margin-right="0.025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49cm" fo:margin-bottom="1.251cm" fo:margin-left="2.75cm" fo:margin-right="1.238cm" style:writing-mode="lr-tb" style:layout-grid-color="#c0c0c0" style:layout-grid-lines="32" style:layout-grid-base-height="0.635cm" style:layout-grid-ruby-height="0cm" style:layout-grid-mode="none" style:layout-grid-ruby-below="false" style:layout-grid-print="false" style:layout-grid-display="false" style:layout-grid-base-width="0.335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905cm" fo:margin-left="0cm" fo:margin-right="0cm" fo:margin-bottom="3.805cm" style:dynamic-spacing="true"/>
      </style:header-style>
      <style:footer-style>
        <style:header-footer-properties fo:min-height="2.443cm" fo:margin-left="0cm" fo:margin-right="0cm" fo:margin-top="2.34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bookmark-start text:name="_GoBack"/><draw:frame draw:style-name="Mfr1" draw:name="Grafik 3" text:anchor-type="char" svg:x="11.18cm" svg:y="1.401cm" svg:width="6.001cm" svg:height="1.951cm" draw:z-index="5"><draw:image xlink:href="Pictures/1022483C0000173700000771ED20D508.emf" xlink:type="simple" xlink:show="embed" xlink:actuate="onLoad" draw:mime-type="image/x-emf"/><draw:image xlink:href="Pictures/10000001000000E100000048E26251BC.png" xlink:type="simple" xlink:show="embed" xlink:actuate="onLoad" draw:mime-type="image/png"/></draw:frame><text:bookmark-end text:name="_GoBack"/></text:p>
      </style:header>
      <style:header-first>
        <text:p text:style-name="Header"><text:bookmark-start text:name="_GoBack Kopie 1"/><draw:frame draw:style-name="Mfr1" draw:name="Grafik 2" text:anchor-type="char" svg:x="11.18cm" svg:y="1.401cm" svg:width="6.001cm" svg:height="1.951cm" draw:z-index="6"><draw:image xlink:href="Pictures/1022483C0000173700000771ED20D508.emf" xlink:type="simple" xlink:show="embed" xlink:actuate="onLoad" draw:mime-type="image/x-emf"/><draw:image xlink:href="Pictures/10000001000000E100000048E26251BC.png" xlink:type="simple" xlink:show="embed" xlink:actuate="onLoad" draw:mime-type="image/png"/></draw:frame><draw:custom-shape text:anchor-type="char" draw:z-index="5" draw:name="Textfeld 2" draw:style-name="Mgr1" draw:text-style-name="MP6" svg:width="4.465cm" svg:height="4.523cm" svg:x="12.788cm" svg:y="2.819cm"><text:p text:style-name="MP1" loext:marker-style-name="MT1">Irenaeus Wolff</text:p><text:p text:style-name="MP2" loext:marker-style-name="MT1">Hafenstrasse 6</text:p><text:p text:style-name="Absender_20_fett" loext:marker-style-name="MT1"><text:span text:style-name="MT1">CH-8280 Kreuzlingen</text:span><text:span text:style-name="MT1"/></text:p><text:p text:style-name="MP3">twi-kreuzlingen.ch</text:p><text:p text:style-name="Sender"/><text:p text:style-name="MP4" loext:marker-style-name="MT1"/><text:p text:style-name="MP5" loext:marker-style-name="MT1"/><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Textfeld 2" draw:style-name="Mgr2" draw:text-style-name="MP6" svg:width="6.633cm" svg:height="0.484cm" svg:x="-0.009cm" svg:y="2.819cm"><text:p text:style-name="Absenderline">TWI, Hafenstrasse 6, CH-8280 Kreuzlinge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_GoBack Kopie 1"/></text:p>
      </style:header-first>
      <style:footer>
        <text:p text:style-name="Footer"><draw:custom-shape text:anchor-type="char" draw:z-index="8" draw:name="Textfeld 5" draw:style-name="Mgr3" draw:text-style-name="MP6" svg:width="1.181cm" svg:height="0.535cm" svg:x="16.148cm" svg:y="-0.095cm"><text:p text:style-name="MP7" loext:marker-style-name="MT2"><text:span text:style-name="MT3"><text:page-number text:select-page="current">2</text:page-number></text:span><text:span text:style-name="MT2"><text:s/></text:span><text:span text:style-name="MT4">|</text:span><text:span text:style-name="MT2"> </text:span><text:span text:style-name="MT2"><text:page-count>2</text:page-count></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first>
        <text:p text:style-name="Footer"><draw:frame draw:style-name="Mfr2" draw:name="Grafik 9" text:anchor-type="char" svg:x="5.392cm" svg:y="-0.843cm" svg:width="0.109cm" svg:height="1.131cm" draw:z-index="0"><draw:image xlink:href="Pictures/1000A7E40000004D00000445654F687A.emf" xlink:type="simple" xlink:show="embed" xlink:actuate="onLoad" draw:mime-type="image/x-emf"/><draw:image xlink:href="Pictures/1000000100000003000000296711C218.png" xlink:type="simple" xlink:show="embed" xlink:actuate="onLoad" draw:mime-type="image/png"/></draw:frame><draw:custom-shape text:anchor-type="char" draw:z-index="1" draw:name="Textfeld 2" draw:style-name="Mgr4" draw:text-style-name="MP6" svg:width="8.485cm" svg:height="1.484cm" svg:x="6.071cm" svg:y="-0.945cm"><text:p text:style-name="Fusszeile" loext:marker-style-name="MT5"><text:span text:style-name="MT6">BITG</text:span><text:span text:style-name="MT5"> – Institut für Zelluläre Biologie und Immunologie Thurgau – bitg.ch</text:span></text:p><text:p text:style-name="Fusszeile" loext:marker-style-name="MT5"><text:span text:style-name="MT6">TWI</text:span><text:span text:style-name="MT5"> – Thurgauer Wirtschaftsinstitut – twi-kreuzlingen.ch</text:span></text:p><text:p text:style-name="Fusszeile" loext:marker-style-name="MT5"><text:span text:style-name="MT6">WITG</text:span><text:span text:style-name="MT5"> – Institut für Werkstoffsystemtechnik Thurgau – witg.ch</text:span></text:p><text:p text:style-name="Fusszeile" loext:marker-style-name="MT5"><text:span text:style-name="MT6">TIDIT</text:span><text:span text:style-name="MT5"> – Thurgauer Institut für Digitale Transformation – tidit.ch</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feld 2" draw:style-name="Mgr5" draw:text-style-name="MP6" svg:width="5.197cm" svg:height="1.484cm" svg:x="-0.018cm" svg:y="-0.945cm"><text:p text:style-name="Fusszeile" loext:marker-style-name="MT7"><text:span text:style-name="MT7">Die Thurgauische Stiftung für </text:span><text:span text:style-name="MT7"/></text:p><text:p text:style-name="Fusszeile" loext:marker-style-name="MT7"><text:span text:style-name="MT7">Wissenschaft und Forschung </text:span><text:span text:style-name="MT7"/></text:p><text:p text:style-name="Fusszeile" loext:marker-style-name="MT7"><text:span text:style-name="MT7">ist Trägerin von folgenden An-Instituten</text:span><text:span text:style-name="MT7"/></text:p><text:p text:style-name="Fusszeile" loext:marker-style-name="MT7"><text:span text:style-name="MT7">an den Konstanzer Hochschulen</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Textfeld 5" draw:style-name="Mgr3" draw:text-style-name="MP6" svg:width="1.181cm" svg:height="0.535cm" svg:x="16.134cm" svg:y="-0.093cm"><text:p text:style-name="MP7" loext:marker-style-name="MT2"><text:span text:style-name="MT3"><text:page-number text:select-page="current">1</text:page-number></text:span><text:span text:style-name="MT2"><text:s/></text:span><text:span text:style-name="MT4">|</text:span><text:span text:style-name="MT2"> </text:span><text:span text:style-name="MT2"><text:page-count>2</text:page-count></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2</meta:editing-cycles>
    <meta:print-date>2024-08-13T06:18:00</meta:print-date>
    <meta:creation-date>2025-04-28T10:55:58.648526119</meta:creation-date>
    <dc:date>2026-06-29T16:35:44.117056391</dc:date>
    <meta:editing-duration>PT9M14S</meta:editing-duration>
    <meta:generator>LibreOffice/25.8.5.2$Linux_X86_64 LibreOffice_project/580$Build-2</meta:generator>
    <meta:document-statistic meta:table-count="0" meta:image-count="3" meta:object-count="0" meta:page-count="2" meta:paragraph-count="30" meta:word-count="548" meta:character-count="3959" meta:non-whitespace-character-count="3431"/>
    <meta:user-defined meta:name="AppVersion">16.0000</meta:user-defined>
    <meta:template xlink:type="simple" xlink:actuate="onRequest" xlink:title="TWI_Template.dotx" xlink:href=""/>
  </office:meta>
</office:document-meta>
</file>