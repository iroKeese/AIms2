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fo:font-size="13pt" fo:font-weight="bold" officeooo:rsid="0002dd8e" officeooo:paragraph-rsid="0002dd8e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Linux Libertine O" fo:font-size="13pt" officeooo:rsid="0002dd8e" officeooo:paragraph-rsid="0002dd8e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Linux Libertine O" fo:font-size="13pt" officeooo:rsid="0002dd8e" officeooo:paragraph-rsid="0009b6e2" style:font-size-asian="13pt" style:font-size-complex="13pt"/>
    </style:style>
    <style:style style:name="T1" style:family="text">
      <style:text-properties officeooo:rsid="000c7f7a"/>
    </style:style>
    <style:style style:name="T2" style:family="text">
      <style:text-properties officeooo:rsid="000a927a"/>
    </style:style>
    <style:style style:name="T3" style:family="text">
      <style:text-properties officeooo:rsid="0009b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Disclosure Statement</text:p>
      <text:p text:style-name="P2"/>
      <text:p text:style-name="P3">The author<text:span text:style-name="T1">s</text:span> declare that <text:span text:style-name="T1">they </text:span>ha<text:span text:style-name="T1">ve</text:span> no relevant or material financial interests that relate to the research described in this paper. Funding by <text:span text:style-name="T2">the Thurgovian Foundation for Science and Research</text:span> <text:span text:style-name="T3">is gratefully acknowledg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487cm" fo:margin-right="3.75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3-13T15:51:27</meta:creation-date>
    <dc:date>2026-06-29T16:11:10.209785697</dc:date>
    <meta:editing-duration>PT13M9S</meta:editing-duration>
    <meta:editing-cycles>10</meta:editing-cycles>
    <meta:generator>LibreOffice/25.8.5.2$Linux_X86_64 LibreOffice_project/580$Build-2</meta:generator>
    <meta:document-statistic meta:table-count="0" meta:image-count="0" meta:object-count="0" meta:page-count="1" meta:paragraph-count="2" meta:word-count="35" meta:character-count="241" meta:non-whitespace-character-count="208"/>
  </office:meta>
</office:document-meta>
</file>